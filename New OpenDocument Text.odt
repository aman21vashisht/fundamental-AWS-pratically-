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style:use-window-font-color="tru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Hyperlink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P25" style:parent-style-name="Normal" style:list-style-name="LFO3" style:family="paragraph"/>
    <style:style style:name="T26" style:parent-style-name="DefaultParagraphFont" style:family="text">
      <style:text-properties style:font-name="Segoe UI Emoji" style:font-name-complex="Segoe UI Emoji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name="Segoe UI Symbol" style:font-name-complex="Segoe UI Symbol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5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5" style:family="paragraph"/>
    <style:style style:name="P40" style:parent-style-name="Normal" style:list-style-name="LFO5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5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5" style:family="paragraph"/>
    <style:style style:name="T45" style:parent-style-name="DefaultParagraphFont" style:family="text">
      <style:text-properties style:font-name="Segoe UI Emoji" style:font-name-complex="Segoe UI Emoji"/>
    </style:style>
    <style:style style:name="T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6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6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TableColumn53" style:family="table-column">
      <style:table-column-properties style:column-width="0.3777in"/>
    </style:style>
    <style:style style:name="TableColumn54" style:family="table-column">
      <style:table-column-properties style:column-width="0.3104in"/>
    </style:style>
    <style:style style:name="TableColumn55" style:family="table-column">
      <style:table-column-properties style:column-width="0.6145in"/>
    </style:style>
    <style:style style:name="Table52" style:family="table">
      <style:table-properties style:width="1.3027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7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7" style:family="paragraph"/>
    <style:style style:name="T7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8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8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style:font-name="Segoe UI Emoji" style:font-name-complex="Segoe UI Emoji"/>
    </style:style>
  </office:automatic-styles>
  <office:body>
    <office:text text:use-soft-page-breaks="true">
      <text:h text:style-name="P1" text:outline-level="1">EC2 ( Elastic Compute Cloud )<text:s/></text:h>
      <text:p text:style-name="Normal"><text:span text:style-name="T2">🚀</text:span><text:span text:style-name="T3"><text:s/>How to Create an EC2 Instance (AWS Console)</text:span></text:p>
      <text:p text:style-name="Normal"><text:span text:style-name="T4">✅</text:span><text:span text:style-name="T5"><text:s/>Step 1: Login to AWS</text:span></text:p>
      <text:list text:style-name="LFO1" text:continue-numbering="true">
        <text:list-item>
          <text:p text:style-name="P6">Go to<text:s/><text:a xlink:href="https://aws.amazon.com" office:target-frame-name="_new" xlink:show="replace"><text:span text:style-name="T7">https://aws.amazon.com</text:span></text:a></text:p>
        </text:list-item>
        <text:list-item>
          <text:p text:style-name="P8">Sign in to<text:s/><text:span text:style-name="T9">AWS Management Console</text:span></text:p>
        </text:list-item>
        <text:list-item>
          <text:p text:style-name="P10">Select a<text:s/><text:span text:style-name="T11">Region</text:span><text:s/>(top-right, e.g.<text:s/>N- verg..)</text:p>
        </text:list-item>
      </text:list>
      <text:p text:style-name="Normal"/>
      <text:p text:style-name="Normal"><text:span text:style-name="T12">✅</text:span><text:span text:style-name="T13"><text:s/>Step 2: Open EC2 Dashboard</text:span></text:p>
      <text:list text:style-name="LFO2" text:continue-numbering="true">
        <text:list-item>
          <text:p text:style-name="P14">Search<text:s/><text:span text:style-name="T15">EC2</text:span></text:p>
        </text:list-item>
        <text:list-item>
          <text:p text:style-name="P16">Click<text:s/><text:span text:style-name="T17">EC2 → Instances</text:span></text:p>
        </text:list-item>
        <text:list-item>
          <text:p text:style-name="P18">Click<text:s/><text:span text:style-name="T19">Launch Instance</text:span></text:p>
        </text:list-item>
      </text:list>
      <text:p text:style-name="Normal"/>
      <text:p text:style-name="Normal"><text:span text:style-name="T20">✅</text:span><text:span text:style-name="T21"><text:s/>Step 3: Choose AMI (Operating System)</text:span></text:p>
      <text:p text:style-name="Normal">Common choices:</text:p>
      <text:list text:style-name="LFO3" text:continue-numbering="true">
        <text:list-item>
          <text:p text:style-name="P22"><text:span text:style-name="T23">Amazon Linux 2023</text:span><text:s/>(recommended)</text:p>
        </text:list-item>
        <text:list-item>
          <text:p text:style-name="P24">Ubuntu 20.04 / 22.04</text:p>
        </text:list-item>
        <text:list-item>
          <text:p text:style-name="P25">Red Hat / Windows</text:p>
        </text:list-item>
      </text:list>
      <text:p text:style-name="Normal"><text:span text:style-name="T26">👉</text:span><text:s/>Select<text:s/><text:span text:style-name="T27">Amazon Linux (Free Tier Eligible)</text:span></text:p>
      <text:p text:style-name="Normal"/>
      <text:p text:style-name="Normal"><text:span text:style-name="T28">✅</text:span><text:span text:style-name="T29"><text:s/>Step 4: Choose Instance Type</text:span></text:p>
      <text:list text:style-name="LFO4" text:continue-numbering="true">
        <text:list-item>
          <text:p text:style-name="P30">Select<text:s/><text:span text:style-name="T31">t2.micro</text:span><text:s/>or<text:s/><text:span text:style-name="T32">t3.micro</text:span><text:line-break/><text:span text:style-name="T33">✔</text:span><text:s/>Free Tier eligible</text:p>
        </text:list-item>
      </text:list>
      <text:p text:style-name="Normal">Click<text:s/><text:span text:style-name="T34">Next</text:span></text:p>
      <text:p text:style-name="Normal"/>
      <text:p text:style-name="Normal"><text:span text:style-name="T35">✅</text:span><text:span text:style-name="T36"><text:s/>Step 5: Create Key Pair (Login Access)</text:span></text:p>
      <text:list text:style-name="LFO5" text:continue-numbering="true">
        <text:list-item>
          <text:p text:style-name="P37">Click<text:s/><text:span text:style-name="T38">Create new key pair</text:span></text:p>
        </text:list-item>
        <text:list-item>
          <text:p text:style-name="P39">Name: ec2-key</text:p>
        </text:list-item>
        <text:list-item>
          <text:p text:style-name="P40">Type:<text:s/><text:span text:style-name="T41">RSA</text:span></text:p>
        </text:list-item>
        <text:list-item>
          <text:p text:style-name="P42">Format:<text:s/><text:span text:style-name="T43">.pem</text:span></text:p>
        </text:list-item>
        <text:list-item>
          <text:p text:style-name="P44">Download &amp; save it safely<text:s/><text:span text:style-name="T45">⚠️</text:span></text:p>
        </text:list-item>
      </text:list>
      <text:p text:style-name="Normal"/>
      <text:p text:style-name="Normal"><text:span text:style-name="T46">✅</text:span><text:span text:style-name="T47"><text:s/>Step 6: Configure Network &amp; Security Group</text:span></text:p>
      <text:list text:style-name="LFO6" text:continue-numbering="true">
        <text:list-item>
          <text:p text:style-name="P48">Allow<text:s/><text:span text:style-name="T49">SSH (22)</text:span><text:s/>→ My IP</text:p>
        </text:list-item>
        <text:list-item>
          <text:p text:style-name="P50">Allow<text:s/><text:span text:style-name="T51">HTTP (80)</text:span><text:s/>→ Anywhere (if hosting website)</text:p>
        </text:list-item>
      </text:list>
      <text:p text:style-name="Normal">Example rules: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header-rows>
          <table:table-row table:style-name="TableRow56">
            <table:table-cell table:style-name="TableCell57">
              <text:p text:style-name="P58">Type</text:p>
            </table:table-cell>
            <table:table-cell table:style-name="TableCell59">
              <text:p text:style-name="P60">Port</text:p>
            </table:table-cell>
            <table:table-cell table:style-name="TableCell61">
              <text:p text:style-name="P62">Source</text:p>
            </table:table-cell>
          </table:table-row>
        </table:table-header-rows>
        <table:table-row table:style-name="TableRow63">
          <table:table-cell table:style-name="TableCell64">
            <text:p text:style-name="Normal">SSH</text:p>
          </table:table-cell>
          <table:table-cell table:style-name="TableCell65">
            <text:p text:style-name="Normal">22</text:p>
          </table:table-cell>
          <table:table-cell table:style-name="TableCell66">
            <text:p text:style-name="Normal">My IP</text:p>
          </table:table-cell>
        </table:table-row>
        <table:table-row table:style-name="TableRow67">
          <table:table-cell table:style-name="TableCell68">
            <text:p text:style-name="Normal">HTTP</text:p>
          </table:table-cell>
          <table:table-cell table:style-name="TableCell69">
            <text:p text:style-name="Normal">80</text:p>
          </table:table-cell>
          <table:table-cell table:style-name="TableCell70">
            <text:p text:style-name="Normal">0.0.0.0/0</text:p>
          </table:table-cell>
        </table:table-row>
      </table:table>
      <text:p text:style-name="Normal"/>
      <text:p text:style-name="Normal"><text:span text:style-name="T71">✅</text:span><text:span text:style-name="T72"><text:s/>Step 7: Storage</text:span></text:p>
      <text:list text:style-name="LFO7" text:continue-numbering="true">
        <text:list-item>
          <text:p text:style-name="P73">Default<text:s/><text:span text:style-name="T74">8 GB</text:span><text:s/>is fine</text:p>
        </text:list-item>
        <text:list-item>
          <text:p text:style-name="P75">EBS type: gp3 or gp2</text:p>
        </text:list-item>
      </text:list>
      <text:p text:style-name="Normal"/>
      <text:p text:style-name="Normal"><text:span text:style-name="T76">✅</text:span><text:span text:style-name="T77"><text:s/>Step 8: Launch Instance</text:span></text:p>
      <text:list text:style-name="LFO8" text:continue-numbering="true">
        <text:list-item>
          <text:p text:style-name="P78">Click<text:s/><text:span text:style-name="T79">Launch Instance</text:span></text:p>
        </text:list-item>
        <text:list-item>
          <text:p text:style-name="P80">Wait until<text:s/><text:span text:style-name="T81">Instance State = Running</text:span><text:s/><text:span text:style-name="T82">🟢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an SHARMA</meta:initial-creator>
    <dc:creator>Aman SHARMA</dc:creator>
    <meta:creation-date>2026-02-11T04:07:00Z</meta:creation-date>
    <dc:date>2026-02-11T04:25:00Z</dc:date>
    <meta:template xlink:href="Normal.dotm" xlink:type="simple"/>
    <meta:editing-cycles>2</meta:editing-cycles>
    <meta:editing-duration>PT1080S</meta:editing-duration>
    <meta:document-statistic meta:page-count="2" meta:paragraph-count="2" meta:word-count="160" meta:character-count="1070" meta:row-count="7" meta:non-whitespace-character-count="912"/>
  </office:meta>
</office:document-meta>
</file>